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CPCB</text:p>
          </table:table-cell>
          <table:table-cell office:value-type="currency" office:currency="NZD" office:value="2" calcext:value-type="currency">
            <text:p>$2.00</text:p>
          </table:table-cell>
        </table:table-row>
        <table:table-row table:style-name="ro1">
          <table:table-cell office:value-type="string" calcext:value-type="string">
            <text:p>Xiao ESP32-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out</text:p>
          </table:table-cell>
          <table:table-cell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C34063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aqiangbei / LCSC</text:p>
          </table:table-cell>
          <table:table-cell office:value-type="currency" office:currency="NZ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TL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aqiangbei / LCSC</text:p>
          </table:table-cell>
          <table:table-cell office:value-type="currency" office:currency="NZD" office:value="0.47" calcext:value-type="currency">
            <text:p>$0.47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out</text:p>
          </table:table-cell>
          <table:table-cell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lout</text:p>
          </table:table-cell>
          <table:table-cell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220r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lout</text:p>
          </table:table-cell>
          <table:table-cell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Other Resisto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lout</text:p>
          </table:table-cell>
          <table:table-cell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Other Capaci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lout</text:p>
          </table:table-cell>
          <table:table-cell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70uH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aqiangbei / LCSC</text:p>
          </table:table-cell>
          <table:table-cell office:value-type="currency" office:currency="NZD" office:value="0.15" calcext:value-type="currency">
            <text:p>$0.15</text:p>
          </table:table-cell>
        </table:table-row>
        <table:table-row table:style-name="ro1">
          <table:table-cell office:value-type="string" calcext:value-type="string">
            <text:p>1N5819 Schottky 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lout</text:p>
          </table:table-cell>
          <table:table-cell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W Pu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lout</text:p>
          </table:table-cell>
          <table:table-cell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lout</text:p>
          </table:table-cell>
          <table:table-cell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NPN BJ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out</text:p>
          </table:table-cell>
          <table:table-cell office:value-type="currency" office:currency="NZ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2T21:06:24.048588900</meta:creation-date>
    <dc:date>2026-07-02T21:15:05.705938800</dc:date>
    <meta:editing-duration>PT8M43S</meta:editing-duration>
    <meta:editing-cycles>1</meta:editing-cycles>
    <meta:document-statistic meta:table-count="1" meta:cell-count="60" meta:object-count="0"/>
    <meta:generator>LibreOffice/26.2.4.2$Windows_X86_64 LibreOffice_project/0229ac93fcf0d7cbc6376066c6f35021cef002dc</meta:generator>
  </office:meta>
</office:document-meta>
</file>